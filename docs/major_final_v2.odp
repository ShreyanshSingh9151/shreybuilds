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37E94B3.png" manifest:media-type="image/png"/>
  <manifest:file-entry manifest:full-path="Pictures/100000000000064000000384561091BF.png" manifest:media-type="image/png"/>
  <manifest:file-entry manifest:full-path="Pictures/10000001000002CD0000004C0119E8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mbria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2.336cm, 0cm, 9.569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36cm, 0.386cm, 10.363cm, 0.67cm)" draw:image-opacity="100%" style:mirror="none" loext:decorative="false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2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cm" fo:margin-bottom="0cm" fo:line-height="2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IN" fo:font-style="normal" style:text-underline-style="none" fo:font-weight="bold" fo:background-color="transparent" style:font-name-asian="Times New Roman2" style:font-size-asian="24pt" style:font-style-asian="normal" style:font-weight-asian="bold" style:font-name-complex="Times New Roman1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IN" fo:font-style="normal" style:text-underline-style="none" fo:font-weight="bold" fo:background-color="transparent" style:font-name-asian="Times New Roman2" style:font-size-asian="33pt" style:font-style-asian="normal" style:font-weight-asian="bold" style:font-name-complex="Times New Roman1" style:font-size-complex="33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IN" fo:font-style="normal" style:text-underline-style="none" fo:font-weight="normal" fo:background-color="transparent" style:font-name-asian="Times New Roman2" style:font-size-asian="24pt" style:font-style-asian="normal" style:font-weight-asian="normal" style:font-name-complex="Times New Roman1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IN" fo:font-style="normal" style:text-underline-style="none" fo:font-weight="bold" fo:background-color="transparent" style:font-name-asian="Times New Roman2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bold" fo:background-color="transparent" style:font-name-asian="Times New Roman2" style:font-size-asian="24pt" style:font-style-asian="normal" style:font-weight-asian="bold" style:font-name-complex="Times New Roman1" style:font-size-complex="2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IN" fo:font-style="normal" style:text-underline-style="none" fo:font-weight="normal" fo:background-color="transparent" style:font-name-asian="Times New Roman2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imes New Roman1" fo:font-size="44pt" fo:letter-spacing="normal" fo:language="en" fo:country="IN" fo:font-style="normal" style:text-underline-style="none" fo:font-weight="bold" fo:background-color="transparent" style:font-name-asian="Cambria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imes New Roman1" fo:font-size="31pt" fo:letter-spacing="normal" fo:language="en" fo:country="IN" fo:font-style="normal" style:text-underline-style="none" fo:font-weight="bold" fo:background-color="transparent" style:font-name-asian="Cambria" style:font-size-asian="31pt" style:font-style-asian="normal" style:font-weight-asian="bold" style:font-name-complex="Times New Roman1" style:font-size-complex="31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1pt" fo:letter-spacing="normal" fo:language="en" fo:country="IN" fo:font-style="normal" style:text-underline-style="none" fo:font-weight="bold" fo:background-color="transparent" style:font-name-asian="Cambria" style:font-size-asian="31pt" style:font-style-asian="normal" style:font-weight-asian="bold" style:font-name-complex="Times New Roman1" style:font-size-complex="31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1pt" fo:letter-spacing="normal" fo:language="en" fo:country="US" fo:font-style="normal" style:text-underline-style="none" fo:font-weight="bold" fo:background-color="transparent" style:font-name-asian="Cambria" style:font-size-asian="31pt" style:font-style-asian="normal" style:font-weight-asian="bold" style:font-name-complex="Times New Roman1" style:font-size-complex="31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fo:background-color="transparent" style:font-name-asian="Cambria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IN" fo:font-style="normal" style:text-underline-style="none" fo:font-weight="normal" fo:background-color="transparent" style:font-name-asian="Cambria" style:font-size-asian="28pt" style:font-style-asian="normal" style:font-weight-asian="normal" style:font-name-complex="Times New Roman1" style:font-size-complex="2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bold" fo:background-color="transparent" style:font-name-asian="Cambria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bold" fo:background-color="transparent" style:font-name-asian="Cambria" style:font-size-asian="36pt" style:font-style-asian="normal" style:font-weight-asian="bold" style:font-name-complex="Times New Roman1" style:font-size-complex="36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4pt" fo:letter-spacing="normal" fo:language="en" fo:country="IN" fo:font-style="normal" style:text-underline-style="none" fo:font-weight="bold" fo:background-color="transparent" style:font-name-asian="Cambria" style:font-size-asian="44pt" style:font-style-asian="normal" style:font-weight-asian="bold" style:font-name-complex="Times New Roman1" style:font-size-complex="44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4pt" fo:letter-spacing="normal" fo:language="en" fo:country="IN" fo:font-style="normal" style:text-underline-style="none" fo:font-weight="bold" fo:background-color="transparent" style:font-size-asian="44pt" style:font-style-asian="normal" style:font-weight-asian="bold" style:font-name-complex="Times New Roman1" style:font-size-complex="44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normal" fo:background-color="transparent" style:font-name-asian="Cambria" style:font-size-asian="36pt" style:font-style-asian="normal" style:font-weight-asian="normal" style:font-name-complex="Times New Roman1" style:font-size-complex="36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Times New Roman1" style:font-size-complex="44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imes New Roman1" style:font-size-complex="36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" draw:style-name="dp1" draw:master-page-name="Title_20_Slide" presentation:presentation-page-layout-name="AL1T0">
        <draw:frame draw:name="Title 1" presentation:style-name="pr1" draw:text-style-name="P2" draw:layer="layout" svg:width="29.748cm" svg:height="3.27cm" svg:x="1.948cm" svg:y="0.765cm" presentation:class="title" presentation:user-transformed="true">
          <draw:text-box>
            <text:p text:style-name="P1"><text:span text:style-name="T1">s</text:span></text:p>
          </draw:text-box>
        </draw:frame>
        <draw:frame draw:name="Subtitle 2" presentation:style-name="pr2" draw:text-style-name="P5" draw:layer="layout" svg:width="32.2cm" svg:height="13.072cm" svg:x="1.011cm" svg:y="5.42cm" presentation:class="subtitle" presentation:user-transformed="true">
          <draw:text-box>
            <text:p text:style-name="P3"><text:span text:style-name="T2">Presentation </text:span></text:p>
            <text:p text:style-name="P3"><text:span text:style-name="T2">On </text:span></text:p>
            <text:p text:style-name="P3"><text:span text:style-name="T3"><text:s/></text:span><text:span text:style-name="T4">EMAIL AUTOMATION USING LLMS</text:span></text:p>
            <text:p text:style-name="P3"><text:span text:style-name="T5">Group Number: 26</text:span></text:p>
            <text:p text:style-name="P4"><text:span text:style-name="T6"><text:s text:c="10"/></text:span></text:p>
            <text:p text:style-name="P3"><text:span text:style-name="T7">Presented by </text:span></text:p>
            <text:p text:style-name="P3"><text:span text:style-name="T8"><text:s/></text:span><text:span text:style-name="T8">VIVEK KUMAR</text:span></text:p>
            <text:p text:style-name="P3"><text:span text:style-name="T8">VATSAL CHAUDHARY</text:span></text:p>
            <text:p text:style-name="P3"><text:span text:style-name="T8">VISHVESHVER</text:span></text:p>
            <text:p text:style-name="P3"><text:span text:style-name="T8">SHREYANSH SINGH RATHORE</text:span></text:p>
            <text:p text:style-name="P3"><text:span text:style-name="T6"><text:s text:c="166"/></text:span><text:span text:style-name="T6">Under the Supervision</text:span></text:p>
            <text:p text:style-name="P3"><text:span text:style-name="T6"><text:s text:c="164"/></text:span><text:span text:style-name="T6">DR. <text:s/>ASIF KHAN <text:s text:c="52"/></text:span></text:p>
            <text:p text:style-name="P3"><text:span text:style-name="T6">(Department of CSE _GNIOT Greater Noida, India)</text:span></text:p>
          </draw:text-box>
        </draw:frame>
        <draw:frame draw:name="Picture 2" draw:style-name="gr1" draw:text-style-name="P6" draw:layer="layout" svg:width="27.521cm" svg:height="3.478cm" svg:x="2.54cm" svg:y="0.557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&#10;                             &#10;   " draw:style-name="dp1" draw:master-page-name="Title_20_and_20_Content" presentation:presentation-page-layout-name="AL2T11">
        <draw:frame draw:name="Title 1" presentation:style-name="pr4" draw:text-style-name="P8" draw:layer="layout" svg:width="33.866cm" svg:height="2.656cm" svg:x="0cm" svg:y="0cm" presentation:class="title" presentation:user-transformed="true">
          <draw:text-box>
            <text:p text:style-name="P1"><text:span text:style-name="T9"><text:s text:c="29"/></text:span><text:span text:style-name="T9"><text:line-break/></text:span><text:span text:style-name="T9"> <text:s text:c="28"/></text:span><text:span text:style-name="T9"><text:line-break/></text:span><text:span text:style-name="T9"> <text:s text:c="28"/></text:span><text:span text:style-name="T9"><text:line-break/></text:span><text:span text:style-name="T9"> <text:s/></text:span><text:span text:style-name="T10">Table of <text:s/>Contents</text:span><text:span text:style-name="T9"><text:line-break/></text:span><text:span text:style-name="T9"/></text:p>
          </draw:text-box>
        </draw:frame>
        <draw:frame draw:name="Content Placeholder 2" presentation:style-name="pr5" draw:text-style-name="P10" draw:layer="layout" svg:width="29.209cm" svg:height="13.581cm" svg:x="2.328cm" svg:y="3.379cm" presentation:class="outline" presentation:user-transformed="true">
          <draw:text-box>
            <text:p text:style-name="P9"><text:span text:style-name="T10">1.</text:span><text:span text:style-name="T11">Introduction</text:span></text:p>
            <text:p text:style-name="P9"><text:span text:style-name="T11">2.</text:span><text:span text:style-name="T12">Research Objectives</text:span></text:p>
            <text:p text:style-name="P9"><text:span text:style-name="T11">3.Literature Survey</text:span></text:p>
            <text:p text:style-name="P9"><text:span text:style-name="T11">4.Proposed Model</text:span></text:p>
            <text:p text:style-name="P9"><text:span text:style-name="T11">5.Discussion About Methodology &amp; Algorithm</text:span></text:p>
            <text:p text:style-name="P9"><text:span text:style-name="T11">6.Conclusion &amp; Future Work</text:span></text:p>
            <text:p text:style-name="P9"><text:span text:style-name="T11">7. Research Paper Progress</text:span></text:p>
            <text:p text:style-name="P9"><text:span text:style-name="T12">8.References</text:span></text:p>
            <text:p text:style-name="P9"><text:span text:style-name="T13"/></text:p>
            <text:p text:style-name="P4"><text:span text:style-name="T14"/></text:p>
          </draw:text-box>
        </draw:frame>
        <draw:frame draw:name="Picture 2" draw:style-name="gr1" draw:text-style-name="P6" draw:layer="layout" svg:width="27.521cm" svg:height="1.616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1.Introduction&#10;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9"><text:line-break/></text:span><text:span text:style-name="T9"><text:line-break/></text:span><text:span text:style-name="T15">1.</text:span><text:span text:style-name="T16">Introduction</text:span><text:span text:style-name="T17"><text:line-break/></text:span><text:span text:style-name="T17"/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1"><text:span text:style-name="T18">Email handling is a high-frequency workflow where users repeatedly read long threads, infer intent, and draft responses under time pressure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The core issue is not only writing speed; it is decision quality: identifying urgency, selecting tone, and preserving thread context without missing commitments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This project frames email automation as an algorithmic pipeline: thread extraction -&gt; intent/priority inference -&gt; response planning -&gt; generation -&gt; post-validation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The system outputs structured assistance (summary, reply draft, rewrite, classification, priority, action items) so users can review quickly and send with confidence.</text:span></text:p>
              </text:list-item>
            </text:list>
          </draw:text-box>
        </draw:frame>
        <draw:frame draw:name="Picture 2" draw:style-name="gr1" draw:text-style-name="P6" draw:layer="layout" svg:width="27.521cm" svg:height="2.014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" draw:style-name="dp1" draw:master-page-name="Title_20_and_20_Content" presentation:presentation-page-layout-name="AL2T11">
        <draw:frame draw:name="Title 1" presentation:style-name="pr4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20"><text:line-break/></text:span><text:span text:style-name="T20"><text:line-break/></text:span><text:span text:style-name="T20"/></text:p>
          </draw:text-box>
        </draw:frame>
        <draw:frame draw:name="Content Placeholder 2" presentation:style-name="pr7" draw:text-style-name="P10" draw:layer="layout" svg:width="29.209cm" svg:height="12.086cm" svg:x="2.328cm" svg:y="4.424cm" presentation:class="outline" presentation:user-transformed="true">
          <draw:text-box>
            <text:list text:style-name="L8">
              <text:list-item>
                <text:p text:style-name="P11"><text:span text:style-name="T18">Formalize a context-extraction methodology that converts noisy thread content into normalized input (subject, sender cues, semantic body blocks)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Design an adaptive decision layer that maps task intent (summarize/reply/rewrite/classify) to generation strategy while preserving output consistency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Implement priority scoring and action-item extraction so outputs are decision-oriented, not only text-completion outputs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Evaluate practical productivity gains using response relevance, tone alignment, summary compression quality, and drafting-time reduction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Build an observability loop that records request volume, latency, token estimate, and per-action cost for continuous prompt and routing improvement.</text:span></text:p>
              </text:list-item>
            </text:list>
          </draw:text-box>
        </draw:frame>
        <draw:frame draw:name="Picture 2" draw:style-name="gr1" draw:text-style-name="P6" draw:layer="layout" svg:width="27.101cm" svg:height="2.145cm" svg:x="2.54cm" svg:y="0.635cm">
          <draw:image xlink:href="Pictures/10000001000002CD0000004C0119E878.png" xlink:type="simple" xlink:show="embed" xlink:actuate="onLoad" draw:mime-type="image/png">
            <text:p/>
          </draw:image>
        </draw:frame>
        <draw:custom-shape draw:name="TextBox 5" draw:style-name="gr3" draw:text-style-name="P15" draw:layer="layout" svg:width="27.703cm" svg:height="2.621cm" svg:x="2.54cm" svg:y="1.824cm">
          <text:p text:style-name="P14"><text:span text:style-name="T21">2.</text:span><text:span text:style-name="T22">Research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3.Literature Survey&#10;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17"><text:line-break/></text:span><text:span text:style-name="T17"><text:line-break/></text:span><text:span text:style-name="T16">3.Literature Survey</text:span><text:span text:style-name="T17"><text:line-break/></text:span><text:span text:style-name="T17"/></text:p>
          </draw:text-box>
        </draw:frame>
        <draw:frame draw:name="Content Placeholder 2" presentation:style-name="pr7" draw:text-style-name="P10" draw:layer="layout" svg:width="29.209cm" svg:height="12.086cm" svg:x="2.54cm" svg:y="3.81cm" presentation:class="outline" presentation:user-transformed="true">
          <draw:text-box>
            <text:list text:style-name="L8">
              <text:list-item>
                <text:p text:style-name="P11"><text:span text:style-name="T23">Transformer-based work established long-context sequence modeling, enabling summarization of multi-message email threads with dependency preservation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23">Prompt-engineering studies show that explicit structure constraints improve reliability for professional communication tasks compared with free-form prompting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23">Earlier email automation systems were largely template/rule-driven; they improved speed but failed on context transfer, personalization, and intent nuance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23">Recent LLM assistants improve fluency, yet papers and product analyses report instability in tone control and actionability without post-processing stages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23">Research gap: an end-to-end methodology that combines context extraction, adaptive generation, and decision-focused post-processing in one workflow.</text:span></text:p>
              </text:list-item>
            </text:list>
          </draw:text-box>
        </draw:frame>
        <draw:frame draw:name="Picture 2" draw:style-name="gr1" draw:text-style-name="P6" draw:layer="layout" svg:width="27.521cm" svg:height="2.093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4.Proposed Model&#10;" draw:style-name="dp1" draw:master-page-name="Title_20_and_20_Content" presentation:presentation-page-layout-name="AL2T11">
        <draw:frame draw:name="Title 1" presentation:style-name="pr4" draw:text-style-name="P8" draw:layer="layout" svg:width="29.198cm" svg:height="3.567cm" svg:x="2.328cm" svg:y="1.014cm" presentation:class="title" presentation:user-transformed="true">
          <draw:text-box>
            <text:p text:style-name="P1"><text:span text:style-name="T17"><text:line-break/></text:span><text:span text:style-name="T17">4.</text:span><text:span text:style-name="T16">Proposed Model</text:span><text:span text:style-name="T17"><text:line-break/></text:span><text:span text:style-name="T17"/></text:p>
          </draw:text-box>
        </draw:frame>
        <draw:frame draw:name="Picture 2" draw:style-name="gr1" draw:text-style-name="P6" draw:layer="layout" svg:width="27.521cm" svg:height="1.726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draw:frame draw:style-name="gr4" draw:text-style-name="P16" draw:layer="layout" svg:width="31.327cm" svg:height="1.674cm" svg:x="1.693cm" svg:y="15.471cm">
          <draw:text-box>
            <text:p>Context-first decision pipeline: normalize thread, infer intent and urgency, plan response, generate structured outputs, and return actionable recommendations.</text:p>
          </draw:text-box>
        </draw:frame>
        <draw:frame draw:style-name="gr5" draw:text-style-name="P17" draw:layer="layout" svg:width="29.746cm" svg:height="9.524cm" svg:x="2.004cm" svg:y="3.811cm">
          <draw:image xlink:href="Pictures/100000000000064000000384561091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5.Discussion About Methodology &amp; Algorithm&#10;" draw:style-name="dp1" draw:master-page-name="Title_20_and_20_Content" presentation:presentation-page-layout-name="AL2T11">
        <draw:frame draw:name="Title 1" presentation:style-name="pr4" draw:text-style-name="P8" draw:layer="layout" svg:width="29.209cm" svg:height="2.206cm" svg:x="2.328cm" svg:y="1.014cm" presentation:class="title" presentation:user-transformed="true">
          <draw:text-box>
            <text:p text:style-name="P1"><text:span text:style-name="T17"><text:line-break/></text:span><text:span text:style-name="T24">5.Discussion About Methodology &amp; Algorithm</text:span><text:span text:style-name="T17"><text:line-break/></text:span><text:span text:style-name="T17"/></text:p>
          </draw:text-box>
        </draw:frame>
        <draw:frame draw:name="Picture 2" draw:style-name="gr1" draw:text-style-name="P6" draw:layer="layout" svg:width="27.521cm" svg:height="1.667cm" svg:x="2.985cm" svg:y="-0.045cm">
          <draw:image xlink:href="Pictures/10000001000002CD0000004C0119E878.png" xlink:type="simple" xlink:show="embed" xlink:actuate="onLoad" draw:mime-type="image/png">
            <text:p/>
          </draw:image>
        </draw:frame>
        <draw:frame draw:style-name="gr6" draw:text-style-name="P17" draw:layer="layout" svg:width="26.648cm" svg:height="8.889cm" svg:x="3.81cm" svg:y="4.991cm">
          <draw:image xlink:href="Pictures/100000000000064000000384437E94B3.png" xlink:type="simple" xlink:show="embed" xlink:actuate="onLoad" draw:mime-type="image/png">
            <text:p/>
          </draw:image>
        </draw:frame>
        <draw:frame draw:style-name="gr7" draw:text-style-name="P16" draw:layer="layout" svg:width="31.327cm" svg:height="1.673cm" svg:x="2.328cm" svg:y="14.605cm">
          <draw:text-box>
            <text:p>Eight-step operational flow from raw thread capture to validated output and metric logging for continuous optimization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6.Conclusion &amp; Future Work" draw:style-name="dp1" draw:master-page-name="Title_20_and_20_Content" presentation:presentation-page-layout-name="AL2T11">
        <draw:frame draw:name="Title 1" presentation:style-name="pr4" draw:text-style-name="P8" draw:layer="layout" svg:width="29.209cm" svg:height="1.394cm" svg:x="2.328cm" svg:y="1.014cm" presentation:class="title" presentation:user-transformed="true">
          <draw:text-box>
            <text:p text:style-name="P1"><text:span text:style-name="T17"><text:line-break/></text:span><text:span text:style-name="T16">6.Conclusion &amp; Future Work</text:span></text:p>
          </draw:text-box>
        </draw:frame>
        <draw:frame draw:name="Content Placeholder 2" presentation:style-name="pr7" draw:text-style-name="P10" draw:layer="layout" svg:width="29.209cm" svg:height="14.5cm" svg:x="1.906cm" svg:y="2.645cm" presentation:class="outline" presentation:user-transformed="true">
          <draw:text-box>
            <text:p text:style-name="P4"><text:span text:style-name="T25">Conclusion:</text:span></text:p>
            <text:p text:style-name="P4"><text:span text:style-name="T19"/></text:p>
            <text:list text:style-name="L8">
              <text:list-item>
                <text:p text:style-name="P4"><text:span text:style-name="T23">LLM-based email automation systems can significantly reduce the manual effort and time invested in professional email drafting and communication.</text:span></text:p>
              </text:list-item>
            </text:list>
            <text:p text:style-name="P4"><text:span text:style-name="T19"/></text:p>
            <text:list text:continue-numbering="true" text:style-name="L8">
              <text:list-item>
                <text:p text:style-name="P4"><text:span text:style-name="T23">The proposed architecture demonstrates effective integration of prompt construction, LLM processing, and post-processing layers to generate contextually appropriate and personalized email content.</text:span></text:p>
              </text:list-item>
            </text:list>
            <text:p text:style-name="P4"><text:span text:style-name="T19"/></text:p>
            <text:p text:style-name="P4"><text:span text:style-name="T25">Future Work:</text:span></text:p>
            <text:list text:continue-numbering="true" text:style-name="L8">
              <text:list-item>
                <text:p text:style-name="P4"><text:span text:style-name="T23">Multilingual email generation to support global enterprise communication.</text:span></text:p>
              </text:list-item>
              <text:list-item>
                <text:p text:style-name="P4"><text:span text:style-name="T23">Improved personalization through advanced user preference learning and behavioral analysis.</text:span></text:p>
              </text:list-item>
              <text:list-item>
                <text:p text:style-name="P4"><text:span text:style-name="T23">Enterprise system integration with CRM, ERP, and collaboration platforms.</text:span></text:p>
              </text:list-item>
              <text:list-item>
                <text:p text:style-name="P4"><text:span text:style-name="T23">Context-aware AI assistants capable of proactive email management and intelligent scheduling.</text:span></text:p>
              </text:list-item>
            </text:list>
          </draw:text-box>
        </draw:frame>
        <draw:frame draw:name="Picture 2" draw:style-name="gr1" draw:text-style-name="P6" draw:layer="layout" svg:width="27.521cm" svg:height="1.667cm" svg:x="2.645cm" svg:y="0.18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7. Research Paper Progress&#10;" draw:style-name="dp1" draw:master-page-name="Title_20_and_20_Content" presentation:presentation-page-layout-name="AL2T11">
        <draw:frame draw:name="Title 1" presentation:style-name="pr4" draw:text-style-name="P8" draw:layer="layout" svg:width="29.209cm" svg:height="2.67cm" svg:x="2.328cm" svg:y="1.414cm" presentation:class="title" presentation:user-transformed="true">
          <draw:text-box>
            <text:p text:style-name="P1"><text:span text:style-name="T17"><text:line-break/></text:span><text:span text:style-name="T16">7. Research Paper Progress</text:span><text:span text:style-name="T17"><text:line-break/></text:span><text:span text:style-name="T17"/></text:p>
          </draw:text-box>
        </draw:frame>
        <draw:frame draw:name="Content Placeholder 2" presentation:style-name="pr7" draw:text-style-name="P10" draw:layer="layout" svg:width="29.209cm" svg:height="14.034cm" svg:x="2.328cm" svg:y="4.268cm" presentation:class="outline" presentation:user-transformed="true">
          <draw:text-box>
            <text:list text:style-name="L8">
              <text:list-item>
                <text:p text:style-name="P11"><text:span text:style-name="T18">Architecture Design: The system architecture comprising the user interface layer, backend processing layer, LLM processing layer, post-processing layer, and data intelligence layer has been finalized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Literature Review Completion: A comprehensive review of transformer-based models, prompt engineering techniques, and prior email automation systems has been completed and documented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Prototype System Development: An initial prototype demonstrating core email generation, summarization, and tone rewriting capabilities has been developed and tested.</text:span></text:p>
              </text:list-item>
            </text:list>
            <text:p text:style-name="P11"><text:span text:style-name="T19"/></text:p>
            <text:list text:continue-numbering="true" text:style-name="L8">
              <text:list-item>
                <text:p text:style-name="P11"><text:span text:style-name="T18">Experimental Evaluation: Benchmarking and evaluation metrics for measuring productivity improvements, response quality, and user satisfaction are being defined for systematic assessment.</text:span></text:p>
              </text:list-item>
            </text:list>
          </draw:text-box>
        </draw:frame>
        <draw:frame draw:name="Picture 2" draw:style-name="gr1" draw:text-style-name="P6" draw:layer="layout" svg:width="27.521cm" svg:height="1.616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8.References&#10;" draw:style-name="dp1" draw:master-page-name="Title_20_and_20_Content" presentation:presentation-page-layout-name="AL2T11">
        <draw:frame draw:name="Title 1" presentation:style-name="pr4" draw:text-style-name="P8" draw:layer="layout" svg:width="29.209cm" svg:height="2.312cm" svg:x="2.328cm" svg:y="1.892cm" presentation:class="title" presentation:user-transformed="true">
          <draw:text-box>
            <text:p text:style-name="P1"><text:span text:style-name="T26"><text:line-break/></text:span><text:span text:style-name="T27">8.References</text:span><text:span text:style-name="T17"><text:line-break/></text:span><text:span text:style-name="T17"/></text:p>
          </draw:text-box>
        </draw:frame>
        <draw:frame draw:name="Content Placeholder 2" presentation:style-name="pr7" draw:text-style-name="P10" draw:layer="layout" svg:width="29.209cm" svg:height="14.844cm" svg:x="2.328cm" svg:y="4.205cm" presentation:class="outline" presentation:user-transformed="true">
          <draw:text-box>
            <text:p text:style-name="P4"><text:span text:style-name="T28">[1] Vaswani, A. et al., "Attention Is All You Need," Advances in Neural Information Processing Systems (NeurIPS), 2017.</text:span></text:p>
            <text:p text:style-name="P4"><text:span text:style-name="T19"/></text:p>
            <text:p text:style-name="P4"><text:span text:style-name="T28">[2] Schulhoff, S. et al., "The Prompt Report: A Systematic Survey of Prompting Techniques," arXiv preprint, 2024.</text:span></text:p>
            <text:p text:style-name="P4"><text:span text:style-name="T19"/></text:p>
            <text:p text:style-name="P4"><text:span text:style-name="T28">[3] Google, "Gemini API Reference," Google AI for Developers, 2024. [Online]. Available: https://ai.google.dev/docs</text:span></text:p>
            <text:p text:style-name="P4"><text:span text:style-name="T19"/></text:p>
            <text:p text:style-name="P4"><text:span text:style-name="T28">[4] Al-Debagy, O. and Martinek, P., "A Comparative Review of Microservices and Monolithic Architectures," Budapest University of Technology and Economics, 2018.</text:span></text:p>
            <text:p text:style-name="P4"><text:span text:style-name="T19"/></text:p>
            <text:p text:style-name="P4"><text:span text:style-name="T28">[5] Dilip, K., "Review on SMTP Protocol for E-Mail Systems," Galgotias University, Department of Computer Science and Engineering, 2020.</text:span></text:p>
            <text:p text:style-name="P4"><text:span text:style-name="T19"/></text:p>
            <text:p text:style-name="P4"><text:span text:style-name="T28">[6] Chen, M. et al., "Leveraging Generative AI in Enterprise Applications," IEEE Conference on AI and Business Operations, 2023.</text:span></text:p>
          </draw:text-box>
        </draw:frame>
        <draw:frame draw:name="Picture 2" draw:style-name="gr1" draw:text-style-name="P6" draw:layer="layout" svg:width="27.521cm" svg:height="1.418cm" svg:x="2.54cm" svg:y="0.473cm">
          <draw:image xlink:href="Pictures/10000001000002CD0000004C0119E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mbria" svg:font-family="Cambria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CSCAI 2024 4,5,6 July 2024,LLOYD Institute of Engineering &amp; Technology Greater Noida,India</dc:title>
    <meta:initial-creator>Arjun Singh</meta:initial-creator>
    <meta:editing-cycles>34</meta:editing-cycles>
    <meta:creation-date>2024-07-02T10:49:33</meta:creation-date>
    <dc:date>2026-04-07T11:43:44.584980585</dc:date>
    <meta:editing-duration>PT9H10M6S</meta:editing-duration>
    <meta:generator>LibreOffice/24.2.7.2$Linux_X86_64 LibreOffice_project/420$Build-2</meta:generator>
    <meta:document-statistic meta:object-count="187"/>
    <meta:user-defined meta:name="AppVersion">16.0000</meta:user-defined>
    <meta:user-defined meta:name="PresentationFormat">Widescreen</meta:user-defined>
    <meta:user-defined meta:name="Slides" meta:value-type="float">10</meta:user-defined>
  </office:meta>
</office:document-meta>
</file>